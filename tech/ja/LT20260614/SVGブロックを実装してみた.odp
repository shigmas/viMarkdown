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2D7000000E9DCF5D36C.png" manifest:media-type="image/png"/>
  <manifest:file-entry manifest:full-path="Pictures/10000000000005A2000001A69264EA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4.607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8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4.607cm" svg:x="1.301cm" svg:y="3.291cm" presentation:class="title" presentation:user-transformed="true">
          <draw:text-box>
            <text:p text:style-name="P1"><text:span text:style-name="T1">マークダウンエディタ </text:span><text:span text:style-name="T1">viMarkdown </text:span><text:span text:style-name="T1">に </text:span><text:span text:style-name="T1"><text:line-break/></text:span><text:span text:style-name="T1">SVG </text:span><text:span text:style-name="T1">ブロックを実装してみたら </text:span><text:span text:style-name="T1"><text:line-break/></text:span><text:span text:style-name="T1">図が意外と簡単に描けるようになった話</text:span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5">K</text:span><text:span text:style-name="T5">工学研究所（研究員）、</text:span><text:span text:style-name="T5">L</text:span><text:span text:style-name="T5">社（首席 </text:span><text:span text:style-name="T5">Software Engineer</text:span><text:span text:style-name="T5">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https://github.com/vivisuke/viMarkdown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3" draw:text-style-name="P10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5"><text:span text:style-name="T3">SVG</text:span><text:span text:style-name="T3">ブロックを実装してみた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```SVG &lt;svg&gt;...&lt;/svg&gt;```</text:span></text:p>
              </text:list-item>
              <text:list-item>
                <text:p text:style-name="P6"><text:span text:style-name="T5">リアルタイムにプレビュー表示</text:span></text:p>
              </text:list-item>
              <text:list-item>
                <text:p text:style-name="P6"><text:span text:style-name="T5">実装</text:span></text:p>
                <text:list>
                  <text:list-item>
                    <text:p text:style-name="P8"><text:span text:style-name="T5">&lt;svg ...&gt; </text:span><text:span text:style-name="T5">だけをパースし、サイズ取得</text:span></text:p>
                  </text:list-item>
                  <text:list-item>
                    <text:p text:style-name="P8"><text:span text:style-name="T5">QImage </text:span><text:span text:style-name="T5">生成、</text:span><text:span text:style-name="T5">LunaSVG </text:span><text:span text:style-name="T5">で描画、表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通常画像（</text:span><text:span text:style-name="T3">PNG</text:span><text:span text:style-name="T3">等）との比較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メリット・デメリットがある</text:span></text:p>
              </text:list-item>
              <text:list-item>
                <text:p text:style-name="P6"><text:span text:style-name="T5">適材適所</text:span></text:p>
              </text:list-item>
            </text:list>
          </draw:text-box>
        </draw:frame>
        <draw:frame draw:style-name="gr2" draw:text-style-name="P9" draw:layer="layout" svg:width="19.236cm" svg:height="6.164cm" svg:x="4.764cm" svg:y="7.336cm">
          <draw:image xlink:href="Pictures/10000000000002D7000000E9DCF5D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生</text:span><text:span text:style-name="T3">SVG</text:span><text:span text:style-name="T3">なんて誰が書くの？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補完ダイアログでがんばる</text:span></text:p>
                <text:list>
                  <text:list-item>
                    <text:p text:style-name="P8"><text:span text:style-name="T5">自動 </text:span><text:span text:style-name="T5">or </text:span><text:span text:style-name="T5">手動</text:span></text:p>
                  </text:list-item>
                </text:list>
              </text:list-item>
              <text:list-item>
                <text:p text:style-name="P6"><text:span text:style-name="T5">お手軽に図を生成・利用</text:span></text:p>
                <text:list>
                  <text:list-item>
                    <text:p text:style-name="P8"><text:span text:style-name="T5">フリー素材</text:span></text:p>
                  </text:list-item>
                  <text:list-item>
                    <text:p text:style-name="P8"><text:span text:style-name="T5">ベクター図形エディタで </text:span><text:span text:style-name="T5">SVG </text:span><text:span text:style-name="T5">を生成・貼り付け</text:span></text:p>
                  </text:list-item>
                  <text:list-item>
                    <text:p text:style-name="P8"><text:span text:style-name="T5">生成</text:span><text:span text:style-name="T5">AI</text:span><text:span text:style-name="T5">利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5"><text:span text:style-name="T1">Gemini</text:span><text:span text:style-name="T1">先生が生成した </text:span><text:span text:style-name="T1">PDCA</text:span><text:span text:style-name="T1">サイクル図</text:span><text:span text:style-name="T4"><text:line-break/></text:span><text:span text:style-name="T4"/></text:p>
          </draw:text-box>
        </draw:frame>
        <draw:frame draw:style-name="gr2" draw:text-style-name="P9" draw:layer="layout" svg:width="26.53cm" svg:height="7.762cm" svg:x="0.47cm" svg:y="5.5cm">
          <draw:image xlink:href="Pictures/10000000000005A2000001A69264E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開発中の </text:span><text:span text:style-name="T5">viMarkdown </text:span><text:span text:style-name="T5">に </text:span><text:span text:style-name="T5">SVG </text:span><text:span text:style-name="T5">ブロックを実装してみた</text:span></text:p>
              </text:list-item>
              <text:list-item>
                <text:p text:style-name="P6"><text:span text:style-name="T5">意外と簡単に図形を表示でき表現力が向上した</text:span></text:p>
              </text:list-item>
              <text:list-item>
                <text:p text:style-name="P6"><text:span text:style-name="T5">生成</text:span><text:span text:style-name="T5">AI</text:span><text:span text:style-name="T5">を使うと</text:span><text:span text:style-name="T5">SVG</text:span><text:span text:style-name="T5">が簡単に作成可能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6-14T13:15:58.230458700</dc:date>
    <meta:editing-duration>PT8H4M13S</meta:editing-duration>
    <meta:editing-cycles>8</meta:editing-cycles>
    <meta:generator>LibreOffice/25.8.6.2$Windows_X86_64 LibreOffice_project/b4b39682cd9868fa725bc664aff94278d315bd04</meta:generator>
    <meta:print-date>2026-06-14T13:14:08.871008700</meta:print-date>
    <meta:printed-by>PDFファイル</meta:printed-by>
    <meta:document-statistic meta:object-count="56"/>
  </office:meta>
</office:document-meta>
</file>
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C000001BD85B8F96B.png" manifest:media-type="image/png"/>
  <manifest:file-entry manifest:full-path="Pictures/10000000000002D7000000E9DCF5D36C.png" manifest:media-type="image/png"/>
  <manifest:file-entry manifest:full-path="Pictures/10000000000005A2000001A69264EAFE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Deep_20_Ocean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een_20_Grass" draw:gradient-step-count="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標準-title">
      <style:graphic-properties draw:textarea-horizontal-align="center" fo:min-height="2.629cm" loext:decorative="false"/>
      <style:paragraph-properties style:writing-mode="lr-tb"/>
    </style:style>
    <style:style style:name="pr2" style:family="presentation" style:parent-style-name="標準-subtitle">
      <style:graphic-properties draw:fill-color="#ffffff" fo:min-height="2cm" loext:decorative="false"/>
      <style:paragraph-properties style:writing-mode="lr-tb"/>
    </style:style>
    <style:style style:name="pr3" style:family="presentation" style:parent-style-name="標準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標準-outline1">
      <style:graphic-properties fo:min-height="8.884cm" loext:decorative="false"/>
      <style:paragraph-properties style:writing-mode="lr-tb"/>
    </style:style>
    <style:style style:name="pr5" style:family="presentation" style:parent-style-name="標準-title">
      <style:graphic-properties draw:textarea-horizontal-align="center" draw:auto-grow-height="true" fo:min-height="2.629cm" loext:decorative="false"/>
      <style:paragraph-properties style:writing-mode="lr-tb"/>
    </style:style>
    <style:style style:name="pr6" style:family="presentation" style:parent-style-name="標準-title">
      <style:graphic-properties draw:auto-grow-height="true" fo:min-height="2.629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100%" fo:text-align="center" fo:text-indent="0cm" style:text-autospace="ideograph-alpha" style:punctuation-wrap="simple" style:line-break="strict" loext:tab-stop-distance="0cm" style:writing-mode="page">
        <style:tab-stops/>
      </style:paragraph-properties>
      <style:text-properties fo:font-size="36pt" style:font-size-asian="36pt" style:font-size-complex="36pt" fo:hyphenate="false" loext:hyphenation-no-caps="false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7" style:family="paragraph">
      <style:paragraph-properties fo:margin-top="0.42cm" fo:margin-bottom="0.35cm" fo:text-align="start"/>
      <style:text-properties fo:font-size="28pt" style:font-size-asian="28pt" style:font-size-complex="28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</style:style>
    <style:style style:name="P12" style:family="paragraph">
      <style:paragraph-properties fo:margin-top="0.42cm" fo:margin-bottom="0.35cm" fo:text-align="center"/>
      <style:text-properties fo:font-size="48pt" style:font-size-asian="48pt" style:font-size-complex="48pt"/>
    </style:style>
    <style:style style:name="P13" style:family="paragraph">
      <style:text-properties fo:font-size="48pt" style:font-size-asian="48pt" style:font-size-complex="4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text-style-name="P2" draw:layer="layout" svg:width="25.199cm" svg:height="4.607cm" svg:x="1.301cm" svg:y="3.291cm" presentation:class="title" presentation:user-transformed="true">
          <draw:text-box>
            <text:p text:style-name="P1"><text:span text:style-name="T1">マークダウンエディタ </text:span><text:span text:style-name="T1">viMarkdown </text:span><text:span text:style-name="T1">に </text:span><text:span text:style-name="T1"><text:line-break/></text:span><text:span text:style-name="T1">SVG </text:span><text:span text:style-name="T1">ブロックを実装してみたら </text:span><text:span text:style-name="T1"><text:line-break/></text:span><text:span text:style-name="T1">図が意外と簡単に描けるようになった話</text:span></text:p>
          </draw:text-box>
        </draw:frame>
        <draw:frame presentation:style-name="pr2" draw:text-style-name="P4" draw:layer="layout" svg:width="25.199cm" svg:height="2cm" svg:x="1.301cm" svg:y="11.5cm" presentation:class="subtitle" presentation:user-transformed="true">
          <draw:text-box>
            <text:p text:style-name="P3">By vivisuke自宅研究員（首席）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6"><text:span text:style-name="T2">自己紹介</text:span><text:line-break/>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3">
              <text:list-item>
                <text:p text:style-name="P7"><text:span text:style-name="T3">自宅研究員（首席）</text:span></text:p>
              </text:list-item>
              <text:list-item>
                <text:p text:style-name="P7"><text:span text:style-name="T3">某国立大学大学院 修士課程修了（工学修士）</text:span></text:p>
              </text:list-item>
              <text:list-item>
                <text:p text:style-name="P7"><text:span text:style-name="T3">K</text:span><text:span text:style-name="T3">工学研究所（研究員）、</text:span><text:span text:style-name="T3">L</text:span><text:span text:style-name="T3">社（首席 </text:span><text:span text:style-name="T3">Software Engineer</text:span><text:span text:style-name="T3">）、</text:span><text:span text:style-name="T3">J</text:span><text:span text:style-name="T3">社（</text:span><text:span text:style-name="T3">SE</text:span><text:span text:style-name="T3">）</text:span></text:p>
              </text:list-item>
              <text:list-item>
                <text:p text:style-name="P7"><text:span text:style-name="T3">主な作品：</text:span><text:span text:style-name="T3">K-Compiler, ViVi editor, </text:span><text:span text:style-name="T3">さくさくエディタ</text:span><text:span text:style-name="T3">, AI poker, Sudoku </text:span><text:span text:style-name="T3">等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" presentation:presentation-page-layout-name="AL2T1">
        <draw:frame presentation:style-name="pr1" draw:layer="layout" svg:width="25.199cm" svg:height="3.302cm" svg:x="1.4cm" svg:y="0.292cm" presentation:class="title" presentation:user-transformed="true">
          <draw:text-box>
            <text:p text:style-name="P6"><text:span text:style-name="T4"><text:s text:c="2"/></text:span><text:span text:style-name="T4"><text:line-break/></text:span><text:span text:style-name="T2">マークダウンエディタ開発中</text:span><text:span text:style-name="T4"><text:line-break/></text:span><text:span text:style-name="T4"><text:line-break/></text:span><text:span text:style-name="T4"/>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3">
              <text:list-item>
                <text:p text:style-name="P9"><text:span text:style-name="T3">https://github.com/vivisuke/viMarkdown</text:span></text:p>
              </text:list-item>
              <text:list-item>
                <text:p text:style-name="P9"><text:span text:style-name="T3">主な特徴：</text:span></text:p>
                <text:list>
                  <text:list-item>
                    <text:p text:style-name="P10"><text:span text:style-name="T3">リアルタイムプレビュー</text:span></text:p>
                  </text:list-item>
                  <text:list-item>
                    <text:p text:style-name="P10"><text:span text:style-name="T3">プレビュー内編集</text:span></text:p>
                  </text:list-item>
                  <text:list-item>
                    <text:p text:style-name="P10"><text:span text:style-name="T3">vi </text:span><text:span text:style-name="T3">コマンド</text:span></text:p>
                  </text:list-item>
                  <text:list-item>
                    <text:p text:style-name="P10"><text:span text:style-name="T3">etc...</text:span></text:p>
                  </text:list-item>
                </text:list>
              </text:list-item>
            </text:list>
          </draw:text-box>
        </draw:frame>
        <draw:frame draw:style-name="gr2" draw:text-style-name="P11" draw:layer="layout" svg:width="11.791cm" svg:height="7.495cm" svg:x="14.808cm" svg:y="7.5cm">
          <draw:image xlink:href="Pictures/10000000000002BC000001BD85B8F96B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2T1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2">SVG</text:span><text:span text:style-name="T2">ブロックを実装してみた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9"><text:span text:style-name="T3">```SVG &lt;svg&gt;...&lt;/svg&gt;```</text:span></text:p>
              </text:list-item>
              <text:list-item>
                <text:p text:style-name="P9"><text:span text:style-name="T3">リアルタイムにプレビュー表示</text:span></text:p>
              </text:list-item>
              <text:list-item>
                <text:p text:style-name="P9"><text:span text:style-name="T3">実装</text:span></text:p>
                <text:list>
                  <text:list-item>
                    <text:p text:style-name="P10"><text:span text:style-name="T3">&lt;svg ...&gt; </text:span><text:span text:style-name="T3">だけをパースし、サイズ取得</text:span></text:p>
                  </text:list-item>
                  <text:list-item>
                    <text:p text:style-name="P10"><text:span text:style-name="T3">QImage </text:span><text:span text:style-name="T3">生成、</text:span><text:span text:style-name="T3">LunaSVG </text:span><text:span text:style-name="T3">で描画、表示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6"><text:span text:style-name="T2">通常画像（</text:span><text:span text:style-name="T2">PNG</text:span><text:span text:style-name="T2">等）との比較</text:span><text:line-break/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9"><text:span text:style-name="T3">メリット・デメリットがある</text:span></text:p>
              </text:list-item>
              <text:list-item>
                <text:p text:style-name="P9"><text:span text:style-name="T3">適材適所</text:span></text:p>
              </text:list-item>
            </text:list>
          </draw:text-box>
        </draw:frame>
        <draw:frame draw:style-name="gr2" draw:text-style-name="P11" draw:layer="layout" svg:width="19.236cm" svg:height="6.164cm" svg:x="4.764cm" svg:y="7.336cm">
          <draw:image xlink:href="Pictures/10000000000002D7000000E9DCF5D3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6"><text:span text:style-name="T2">生</text:span><text:span text:style-name="T2">SVG</text:span><text:span text:style-name="T2">なんて誰が書くの？</text:span><text:line-break/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9"><text:span text:style-name="T3">補完ダイアログでがんばる</text:span></text:p>
                <text:list>
                  <text:list-item>
                    <text:p text:style-name="P10"><text:span text:style-name="T3">自動 </text:span><text:span text:style-name="T3">or </text:span><text:span text:style-name="T3">手動</text:span></text:p>
                  </text:list-item>
                </text:list>
              </text:list-item>
              <text:list-item>
                <text:p text:style-name="P9"><text:span text:style-name="T3">お手軽に図を生成</text:span></text:p>
                <text:list>
                  <text:list-item>
                    <text:p text:style-name="P10"><text:span text:style-name="T3">フリー素材</text:span></text:p>
                  </text:list-item>
                  <text:list-item>
                    <text:p text:style-name="P10"><text:span text:style-name="T3">ベクター図形エディタで </text:span><text:span text:style-name="T3">SVG </text:span><text:span text:style-name="T3">を生成・貼り付け</text:span></text:p>
                  </text:list-item>
                  <text:list-item>
                    <text:p text:style-name="P10"><text:span text:style-name="T3">生成</text:span><text:span text:style-name="T3">AI</text:span><text:span text:style-name="T3">利用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 text:style-name="P6"><text:span text:style-name="T1">Gemini</text:span><text:span text:style-name="T1">先生が生成した </text:span><text:span text:style-name="T1">PDCA</text:span><text:span text:style-name="T1">サイクル図</text:span><text:line-break/></text:p>
          </draw:text-box>
        </draw:frame>
        <draw:frame draw:style-name="gr2" draw:text-style-name="P11" draw:layer="layout" svg:width="26.53cm" svg:height="7.762cm" svg:x="0.47cm" svg:y="5.5cm">
          <draw:image xlink:href="Pictures/10000000000005A2000001A69264EA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2T1">
        <draw:frame presentation:style-name="pr6" draw:layer="layout" svg:width="25.199cm" svg:height="2.629cm" svg:x="1.4cm" svg:y="0.628cm" presentation:class="title">
          <draw:text-box>
            <text:p>まとめ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9"><text:span text:style-name="T3">開発中の </text:span><text:span text:style-name="T3">viMarkdown </text:span><text:span text:style-name="T3">に </text:span><text:span text:style-name="T3">SVG </text:span><text:span text:style-name="T3">ブロックを実装してみた</text:span></text:p>
              </text:list-item>
              <text:list-item>
                <text:p text:style-name="P9"><text:span text:style-name="T3">意外と簡単に図形を表示でき表現力が向上した</text:span></text:p>
              </text:list-item>
              <text:list-item>
                <text:p text:style-name="P9"><text:span text:style-name="T3">Github </text:span><text:span text:style-name="T3">でソース・</text:span><text:span text:style-name="T3">Windows</text:span><text:span text:style-name="T3">バイナリ公開</text:span></text:p>
                <text:list>
                  <text:list-item>
                    <text:p text:style-name="P10"><text:span text:style-name="T3">ダウンロード＆★よろしくー</text:span></text:p>
                  </text:list-item>
                </text:list>
              </text:list-item>
              <text:list-item>
                <text:p text:style-name="P10"><text:span text:style-name="T3">ご清聴、ありがとうございましたー</text:span></text:p>
                <text:p text:style-name="P9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>
      <loext:gradient-stop svg:offset="0" loext:color-type="rgb" loext:color-value="#000000"/>
      <loext:gradient-stop svg:offset="1" loext:color-type="rgb" loext:color-value="#729fcf"/>
    </draw:gradient>
    <draw:gradient draw:name="Green_20_Grass" draw:display-name="Green Grass" draw:style="linear" draw:start-color="#ffff00" draw:end-color="#81d41a" draw:start-intensity="100%" draw:end-intensity="100%" draw:angle="30deg" draw:border="0%">
      <loext:gradient-stop svg:offset="0" loext:color-type="rgb" loext:color-value="#ffff00"/>
      <loext:gradient-stop svg:offset="1" loext:color-type="rgb" loext:color-value="#81d41a"/>
    </draw:gradient>
    <draw:gradient draw:name="Neon_20_Light" draw:display-name="Neon Light" draw:style="ellipsoid" draw:cx="50%" draw:cy="50%" draw:start-color="#127622" draw:end-color="#ffffff" draw:start-intensity="100%" draw:end-intensity="100%" draw:angle="0deg" draw:border="15%">
      <loext:gradient-stop svg:offset="0" loext:color-type="rgb" loext:color-value="#127622"/>
      <loext:gradient-stop svg:offset="1" loext:color-type="rgb" loext:color-value="#ffffff"/>
    </draw:gradient>
    <draw:gradient draw:name="Sunshine" draw:style="radial" draw:cx="66%" draw:cy="33%" draw:start-color="#ffbf00" draw:end-color="#ffff00" draw:start-intensity="100%" draw:end-intensity="100%" draw:border="33%">
      <loext:gradient-stop svg:offset="0" loext:color-type="rgb" loext:color-value="#ffbf00"/>
      <loext:gradient-stop svg:offset="1" loext:color-type="rgb" loext:color-value="#ffff00"/>
    </draw:gradient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標準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13T08:08:36.517177900</meta:creation-date>
    <dc:date>2026-06-13T10:16:16.174086400</dc:date>
    <meta:editing-duration>PT20M48S</meta:editing-duration>
    <meta:editing-cycles>5</meta:editing-cycles>
    <meta:generator>LibreOffice/25.8.6.2$Windows_X86_64 LibreOffice_project/b4b39682cd9868fa725bc664aff94278d315bd04</meta:generator>
    <meta:print-date>2026-06-13T10:09:43.143337400</meta:print-date>
    <meta:printed-by>PDFファイル</meta:printed-by>
    <meta:document-statistic meta:object-count="55"/>
  </office:meta>
</office:document-meta>
</file>
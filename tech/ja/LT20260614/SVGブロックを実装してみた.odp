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A000001135245A5AF.png" manifest:media-type="image/png"/>
  <manifest:file-entry manifest:full-path="Pictures/10000000000002BC000001BD85B8F96B.png" manifest:media-type="image/png"/>
  <manifest:file-entry manifest:full-path="Pictures/10000000000002D7000000E9DCF5D36C.png" manifest:media-type="image/png"/>
  <manifest:file-entry manifest:full-path="Pictures/10000000000005A2000001A69264EA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een_20_Grass" draw:gradient-step-count="0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標準-title">
      <style:graphic-properties draw:textarea-horizontal-align="center" fo:min-height="4.607cm" loext:decorative="false"/>
      <style:paragraph-properties style:writing-mode="lr-tb"/>
    </style:style>
    <style:style style:name="pr2" style:family="presentation" style:parent-style-name="標準-subtitle">
      <style:graphic-properties draw:fill-color="#ffffff" fo:min-height="2cm" loext:decorative="false"/>
      <style:paragraph-properties style:writing-mode="lr-tb"/>
    </style:style>
    <style:style style:name="pr3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標準-title">
      <style:graphic-properties draw:textarea-horizontal-align="center" fo:min-height="2.629cm" loext:decorative="false"/>
      <style:paragraph-properties style:writing-mode="lr-tb"/>
    </style:style>
    <style:style style:name="pr5" style:family="presentation" style:parent-style-name="標準-outline1">
      <style:graphic-properties fo:min-height="8.884cm" loext:decorative="false"/>
      <style:paragraph-properties style:writing-mode="lr-tb"/>
    </style:style>
    <style:style style:name="pr6" style:family="presentation" style:parent-style-name="標準-title">
      <style:graphic-properties draw:textarea-horizontal-align="center" fo:min-height="3.302cm" loext:decorative="false"/>
      <style:paragraph-properties style:writing-mode="lr-tb"/>
    </style:style>
    <style:style style:name="pr7" style:family="presentation" style:parent-style-name="標準-title">
      <style:graphic-properties draw:textarea-horizontal-align="center" draw:auto-grow-height="true" fo:min-height="2.629cm" loext:decorative="false"/>
      <style:paragraph-properties style:writing-mode="lr-tb"/>
    </style:style>
    <style:style style:name="pr8" style:family="presentation" style:parent-style-name="標準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0cm" style:writing-mode="page">
        <style:tab-stops/>
      </style:paragraph-properties>
      <style:text-properties fo:hyphenate="false" loext:hyphenation-no-caps="false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fo:font-size="48pt" style:font-size-asian="48pt" style:font-size-complex="4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9cm" svg:height="4.607cm" svg:x="1.301cm" svg:y="3.291cm" presentation:class="title" presentation:user-transformed="true">
          <draw:text-box>
            <text:p text:style-name="P1"><text:span text:style-name="T1">マークダウンエディタ </text:span><text:span text:style-name="T1">viMarkdown </text:span><text:span text:style-name="T1">に </text:span><text:span text:style-name="T1"><text:line-break/></text:span><text:span text:style-name="T1">SVG </text:span><text:span text:style-name="T1">ブロックを実装してみたら </text:span><text:span text:style-name="T1"><text:line-break/></text:span><text:span text:style-name="T1">図が意外と簡単に描けるようになった話</text:span></text:p>
          </draw:text-box>
        </draw:frame>
        <draw:frame presentation:style-name="pr2" draw:text-style-name="P3" draw:layer="layout" svg:width="25.199cm" svg:height="2cm" svg:x="1.301cm" svg:y="11.5cm" presentation:class="subtitle" presentation:user-transformed="true">
          <draw:text-box>
            <text:p><text:span text:style-name="T2">vivisuke</text:span><text:span text:style-name="T2">　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自己紹介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自宅研究員（首席）</text:span></text:p>
              </text:list-item>
              <text:list-item>
                <text:p text:style-name="P6"><text:span text:style-name="T5">某国立大学大学院 修士課程修了（工学修士）</text:span></text:p>
              </text:list-item>
              <text:list-item>
                <text:p text:style-name="P6"><text:span text:style-name="T5">K</text:span><text:span text:style-name="T5">工学研究所（研究員）、</text:span><text:span text:style-name="T5">L</text:span><text:span text:style-name="T5">社（首席 </text:span><text:span text:style-name="T5">Software Engineer</text:span><text:span text:style-name="T5">）、</text:span><text:span text:style-name="T5">J</text:span><text:span text:style-name="T5">社（</text:span><text:span text:style-name="T5">SE</text:span><text:span text:style-name="T5">）</text:span></text:p>
              </text:list-item>
              <text:list-item>
                <text:p text:style-name="P6"><text:span text:style-name="T5">主な作品：</text:span><text:span text:style-name="T5">K-Compiler, ViVi editor, </text:span><text:span text:style-name="T5">さくさくエディタ</text:span><text:span text:style-name="T5">, AI poker, Sudoku </text:span><text:span text:style-name="T5">等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draw:frame presentation:style-name="pr6" draw:layer="layout" svg:width="25.199cm" svg:height="3.302cm" svg:x="1.4cm" svg:y="0.292cm" presentation:class="title" presentation:user-transformed="true">
          <draw:text-box>
            <text:p text:style-name="P5"><text:span text:style-name="T4"><text:s text:c="2"/></text:span><text:span text:style-name="T4"><text:line-break/></text:span><text:span text:style-name="T3">マークダウンエディタ開発中</text:span><text:span text:style-name="T4"><text:line-break/>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https://github.com/vivisuke/viMarkdown</text:span></text:p>
              </text:list-item>
              <text:list-item>
                <text:p text:style-name="P6"><text:span text:style-name="T5">主な特徴：</text:span></text:p>
                <text:list>
                  <text:list-item>
                    <text:p text:style-name="P8"><text:span text:style-name="T5">リアルタイムプレビュー</text:span></text:p>
                  </text:list-item>
                  <text:list-item>
                    <text:p text:style-name="P8"><text:span text:style-name="T5">プレビュー内編集</text:span></text:p>
                  </text:list-item>
                  <text:list-item>
                    <text:p text:style-name="P8"><text:span text:style-name="T5">vi </text:span><text:span text:style-name="T5">コマンド</text:span></text:p>
                  </text:list-item>
                  <text:list-item>
                    <text:p text:style-name="P8"><text:span text:style-name="T5">etc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192cm" svg:height="7.75cm" svg:x="14.808cm" svg:y="7.25cm">
          <draw:image xlink:href="Pictures/10000000000002BC000001BD85B8F96B.png" xlink:type="simple" xlink:show="embed" xlink:actuate="onLoad" draw:mime-type="image/png">
            <text:p/>
          </draw:image>
        </draw:frame>
        <draw:frame draw:style-name="gr3" draw:text-style-name="P10" draw:layer="layout" svg:width="7cm" svg:height="2.58cm" svg:x="20cm" svg:y="3.92cm">
          <draw:image xlink:href="Pictures/10000000000002EA000001135245A5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 text:style-name="P5"><text:span text:style-name="T3">SVG</text:span><text:span text:style-name="T3">ブロックを実装してみた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```SVG &lt;svg&gt;...&lt;/svg&gt;```</text:span></text:p>
              </text:list-item>
              <text:list-item>
                <text:p text:style-name="P6"><text:span text:style-name="T5">リアルタイムにプレビュー表示</text:span></text:p>
              </text:list-item>
              <text:list-item>
                <text:p text:style-name="P6"><text:span text:style-name="T5">実装</text:span></text:p>
                <text:list>
                  <text:list-item>
                    <text:p text:style-name="P8"><text:span text:style-name="T5">&lt;svg ...&gt; </text:span><text:span text:style-name="T5">だけをパースし、サイズ取得</text:span></text:p>
                  </text:list-item>
                  <text:list-item>
                    <text:p text:style-name="P8"><text:span text:style-name="T5">QImage </text:span><text:span text:style-name="T5">生成、</text:span><text:span text:style-name="T5">LunaSVG </text:span><text:span text:style-name="T5">で描画、表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通常画像（</text:span><text:span text:style-name="T3">PNG</text:span><text:span text:style-name="T3">等）との比較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メリット・デメリットがある</text:span></text:p>
              </text:list-item>
              <text:list-item>
                <text:p text:style-name="P6"><text:span text:style-name="T5">適材適所</text:span></text:p>
              </text:list-item>
            </text:list>
          </draw:text-box>
        </draw:frame>
        <draw:frame draw:style-name="gr2" draw:text-style-name="P9" draw:layer="layout" svg:width="19.236cm" svg:height="6.164cm" svg:x="4.764cm" svg:y="7.336cm">
          <draw:image xlink:href="Pictures/10000000000002D7000000E9DCF5D3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生</text:span><text:span text:style-name="T3">SVG</text:span><text:span text:style-name="T3">なんて誰が書くの？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補完ダイアログでがんばる</text:span></text:p>
                <text:list>
                  <text:list-item>
                    <text:p text:style-name="P8"><text:span text:style-name="T5">自動 </text:span><text:span text:style-name="T5">or </text:span><text:span text:style-name="T5">手動</text:span></text:p>
                  </text:list-item>
                </text:list>
              </text:list-item>
              <text:list-item>
                <text:p text:style-name="P6"><text:span text:style-name="T5">お手軽に図を生成・利用</text:span></text:p>
                <text:list>
                  <text:list-item>
                    <text:p text:style-name="P8"><text:span text:style-name="T5">フリー素材</text:span></text:p>
                  </text:list-item>
                  <text:list-item>
                    <text:p text:style-name="P8"><text:span text:style-name="T5">ベクター図形エディタで </text:span><text:span text:style-name="T5">SVG </text:span><text:span text:style-name="T5">を生成・貼り付け</text:span></text:p>
                  </text:list-item>
                  <text:list-item>
                    <text:p text:style-name="P8"><text:span text:style-name="T5">生成</text:span><text:span text:style-name="T5">AI</text:span><text:span text:style-name="T5">利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 text:style-name="P5"><text:span text:style-name="T1">Gemini</text:span><text:span text:style-name="T1">先生が生成した </text:span><text:span text:style-name="T1">PDCA</text:span><text:span text:style-name="T1">サイクル図</text:span><text:span text:style-name="T4"><text:line-break/></text:span><text:span text:style-name="T4"/></text:p>
          </draw:text-box>
        </draw:frame>
        <draw:frame draw:style-name="gr2" draw:text-style-name="P9" draw:layer="layout" svg:width="26.53cm" svg:height="7.762cm" svg:x="0.47cm" svg:y="5.5cm">
          <draw:image xlink:href="Pictures/10000000000005A2000001A69264EA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draw:frame presentation:style-name="pr8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開発中の </text:span><text:span text:style-name="T5">viMarkdown </text:span><text:span text:style-name="T5">に </text:span><text:span text:style-name="T5">SVG </text:span><text:span text:style-name="T5">ブロックを実装してみた</text:span></text:p>
              </text:list-item>
              <text:list-item>
                <text:p text:style-name="P6"><text:span text:style-name="T5">意外と簡単に図形を表示でき表現力が向上した</text:span></text:p>
              </text:list-item>
              <text:list-item>
                <text:p text:style-name="P6"><text:span text:style-name="T5">Github </text:span><text:span text:style-name="T5">でソース・</text:span><text:span text:style-name="T5">Windows</text:span><text:span text:style-name="T5">バイナリ公開</text:span></text:p>
                <text:list>
                  <text:list-item>
                    <text:p text:style-name="P8"><text:span text:style-name="T5">ダウンロード＆★よろしくー</text:span></text:p>
                  </text:list-item>
                </text:list>
              </text:list-item>
              <text:list-item>
                <text:p text:style-name="P8"><text:span text:style-name="T5">ご清聴、ありがとうございましたー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8:08:36.517177900</meta:creation-date>
    <dc:date>2026-06-14T05:39:17.377375900</dc:date>
    <meta:editing-duration>PT27M33S</meta:editing-duration>
    <meta:editing-cycles>7</meta:editing-cycles>
    <meta:generator>LibreOffice/25.8.6.2$Windows_X86_64 LibreOffice_project/b4b39682cd9868fa725bc664aff94278d315bd04</meta:generator>
    <meta:print-date>2026-06-13T10:09:43.143337400</meta:print-date>
    <meta:printed-by>PDFファイル</meta:printed-by>
    <meta:document-statistic meta:object-count="56"/>
  </office:meta>
</office:document-meta>
</file>
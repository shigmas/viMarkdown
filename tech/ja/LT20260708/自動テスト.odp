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4.607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8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lef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lef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6.148cm" svg:x="1.301cm" svg:y="2.521cm" presentation:class="title" presentation:user-transformed="true">
          <draw:text-box>
            <text:p text:style-name="P1"><text:span text:style-name="T1">１文字のずれも許さない</text:span><text:span text:style-name="T1">Vim</text:span><text:span text:style-name="T1">おじさんに</text:span><text:span text:style-name="T1"><text:line-break/></text:span><text:span text:style-name="T1">怒られないために、</text:span><text:span text:style-name="T1">vi/ex </text:span><text:span text:style-name="T1">自動テストを</text:span><text:span text:style-name="T1"><text:line-break/></text:span><text:span text:style-name="T1">viMarkdown </text:span><text:span text:style-name="T1">に組み込んだ話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5">K</text:span><text:span text:style-name="T5">工学研究所（研究員）、</text:span><text:span text:style-name="T5">L</text:span><text:span text:style-name="T5">社（首席 </text:span><text:span text:style-name="T5">Software Engineer</text:span><text:span text:style-name="T5">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ググってね＞「</text:span><text:span text:style-name="T5">viMarkdown</text:span><text:span text:style-name="T5">」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CSV, SVG, diff, 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.25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2" draw:text-style-name="P9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3">スケジュールは完璧、だが…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５月～：</text:span><text:span text:style-name="T5">ver 0.3 </text:span><text:span text:style-name="T5">開発版、</text:span></text:p>
              </text:list-item>
              <text:list-item>
                <text:p text:style-name="P6"><text:span text:style-name="T5">８月～：</text:span><text:span text:style-name="T5">alpha</text:span><text:span text:style-name="T5">版、</text:span><text:span text:style-name="T5">10</text:span><text:span text:style-name="T5">月～：</text:span><text:span text:style-name="T5">beta</text:span><text:span text:style-name="T5">版、</text:span></text:p>
              </text:list-item>
              <text:list-item>
                <text:p text:style-name="P6"><text:span text:style-name="T5">12</text:span><text:span text:style-name="T5">月～：</text:span><text:span text:style-name="T5">ver 0.4 RC, Stable </text:span><text:span text:style-name="T5">版</text:span></text:p>
              </text:list-item>
              <text:list-item>
                <text:p text:style-name="P11"><text:span text:style-name="T5">ver 0.4 </text:span><text:span text:style-name="T5">の目玉のひとつは </text:span><text:span text:style-name="T5">vi/ex </text:span><text:span text:style-name="T5">コマンドサポート</text:span></text:p>
              </text:list-item>
              <text:list-item>
                <text:p text:style-name="P11"><text:span text:style-name="T5">vi </text:span><text:span text:style-name="T5">コマンドの挙動が１文字でもずれていると</text:span><text:span text:style-name="T5">Vim</text:span><text:span text:style-name="T5">おじさんが怒る</text:span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Vim</text:span><text:span text:style-name="T3">おじさんはなぜ怒るのか？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 text:style-name="P5"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8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/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7-04T12:26:31.428278200</dc:date>
    <meta:editing-duration>PT15H21M31S</meta:editing-duration>
    <meta:editing-cycles>10</meta:editing-cycles>
    <meta:generator>LibreOffice/26.2.4.2$Windows_X86_64 LibreOffice_project/0229ac93fcf0d7cbc6376066c6f35021cef002dc</meta:generator>
    <meta:print-date>2026-06-14T14:45:30.011281200</meta:print-date>
    <meta:printed-by>PDFファイル</meta:printed-by>
    <meta:document-statistic meta:object-count="54"/>
  </office:meta>
</office:document-meta>
</file>
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3000000E0CA7C984B.png" manifest:media-type="image/png"/>
  <manifest:file-entry manifest:full-path="Pictures/10000000000002EA000001135245A5AF.png" manifest:media-type="image/png"/>
  <manifest:file-entry manifest:full-path="Pictures/10000000000002BC000001BD85B8F96B.png" manifest:media-type="image/png"/>
  <manifest:file-entry manifest:full-path="Pictures/100000000000012A0000005DC611980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7.672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5" style:family="presentation" style:parent-style-name="標準-outline1">
      <style:graphic-properties fo:min-height="8.884cm" loext:decorative="false"/>
      <style:paragraph-properties style:writing-mode="lr-tb"/>
    </style:style>
    <style:style style:name="pr6" style:family="presentation" style:parent-style-name="標準-title">
      <style:graphic-properties draw:textarea-horizontal-align="center" fo:min-height="3.302cm" loext:decorative="false"/>
      <style:paragraph-properties style:writing-mode="lr-tb"/>
    </style:style>
    <style:style style:name="pr7" style:family="presentation" style:parent-style-name="標準-title">
      <style:graphic-properties draw:textarea-horizontal-align="center" fo:min-height="4.086cm" loext:decorative="false"/>
      <style:paragraph-properties style:writing-mode="lr-tb"/>
    </style:style>
    <style:style style:name="pr8" style:family="presentation" style:parent-style-name="標準-title">
      <style:graphic-properties draw:textarea-horizontal-align="center" draw:auto-grow-height="true" fo:min-height="3.302cm" loext:decorative="false"/>
      <style:paragraph-properties style:writing-mode="lr-tb"/>
    </style:style>
    <style:style style:name="pr9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10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36pt" style:font-size-asian="36pt" style:font-size-complex="36pt" fo:hyphenate="false" loext:hyphenation-no-caps="false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lef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lef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.42cm" fo:margin-bottom="0.35cm" fo:text-align="left" fo:text-indent="0cm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JP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7.672cm" svg:x="1.301cm" svg:y="2.238cm" presentation:class="title" presentation:user-transformed="true">
          <draw:text-box>
            <text:p text:style-name="P1"><text:span text:style-name="T1">１文字のずれも許さない</text:span><text:span text:style-name="T1">Vim</text:span><text:span text:style-name="T1">おじさんに</text:span><text:span text:style-name="T1"><text:line-break/></text:span><text:span text:style-name="T1">イエローカードを出されないよう、</text:span><text:span text:style-name="T1"><text:line-break/></text:span><text:span text:style-name="T1">vi/ex </text:span><text:span text:style-name="T1">自動テストを</text:span><text:span text:style-name="T1"><text:line-break/></text:span><text:span text:style-name="T1">viMarkdown </text:span><text:span text:style-name="T1">に組み込んだ話</text:span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2cm" svg:x="1.301cm" svg:y="11.5cm" presentation:class="subtitle" presentation:user-transformed="true">
          <draw:text-box>
            <text:p><text:span text:style-name="T2">vivisuke</text:span><text:span text:style-name="T2">　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自己紹介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自宅研究員（首席）</text:span></text:p>
              </text:list-item>
              <text:list-item>
                <text:p text:style-name="P6"><text:span text:style-name="T5">某国立大学大学院 修士課程修了（工学修士）</text:span></text:p>
              </text:list-item>
              <text:list-item>
                <text:p text:style-name="P6"><text:span text:style-name="T6">KK</text:span><text:span text:style-name="T6">研究所（研究員）、</text:span><text:span text:style-name="T6">L</text:span><text:span text:style-name="T6">社（現</text:span><text:span text:style-name="T6">IBM, Software Engineer, </text:span><text:span text:style-name="T5">首席）、</text:span><text:span text:style-name="T5">J</text:span><text:span text:style-name="T5">社（</text:span><text:span text:style-name="T5">SE</text:span><text:span text:style-name="T5">）</text:span></text:p>
              </text:list-item>
              <text:list-item>
                <text:p text:style-name="P6"><text:span text:style-name="T5">主な作品：</text:span><text:span text:style-name="T5">K-Compiler, ViVi editor, </text:span><text:span text:style-name="T5">さくさくエディタ</text:span><text:span text:style-name="T5">, AI poker, Sudoku </text:span><text:span text:style-name="T5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s text:c="2"/></text:span><text:span text:style-name="T4"><text:line-break/></text:span><text:span text:style-name="T3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ググってね＞「</text:span><text:span text:style-name="T5">viMarkdown</text:span><text:span text:style-name="T5">」</text:span></text:p>
              </text:list-item>
              <text:list-item>
                <text:p text:style-name="P6"><text:span text:style-name="T5">主な特徴：</text:span></text:p>
                <text:list>
                  <text:list-item>
                    <text:p text:style-name="P8"><text:span text:style-name="T5">リアルタイムプレビュー</text:span></text:p>
                  </text:list-item>
                  <text:list-item>
                    <text:p text:style-name="P8"><text:span text:style-name="T5">プレビュー内編集</text:span></text:p>
                  </text:list-item>
                  <text:list-item>
                    <text:p text:style-name="P8"><text:span text:style-name="T5">vi </text:span><text:span text:style-name="T5">コマンド</text:span></text:p>
                  </text:list-item>
                  <text:list-item>
                    <text:p text:style-name="P8"><text:span text:style-name="T5">CSV, SVG, diff, etc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192cm" svg:height="7.75cm" svg:x="14.808cm" svg:y="7cm">
          <draw:image xlink:href="Pictures/10000000000002BC000001BD85B8F96B.png" xlink:type="simple" xlink:show="embed" xlink:actuate="onLoad" draw:mime-type="image/png">
            <text:p/>
          </draw:image>
        </draw:frame>
        <draw:frame draw:style-name="gr2" draw:text-style-name="P9" draw:layer="layout" svg:width="7cm" svg:height="2.58cm" svg:x="20cm" svg:y="3.92cm">
          <draw:image xlink:href="Pictures/10000000000002EA000001135245A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3">スケジュールは完璧、だが…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５月～：</text:span><text:span text:style-name="T5">ver 0.3 </text:span><text:span text:style-name="T5">開発版、← いまここ</text:span></text:p>
              </text:list-item>
              <text:list-item>
                <text:p text:style-name="P6"><text:span text:style-name="T5">８月～：</text:span><text:span text:style-name="T5">alpha</text:span><text:span text:style-name="T5">版、</text:span><text:span text:style-name="T5">10</text:span><text:span text:style-name="T5">月～：</text:span><text:span text:style-name="T5">beta</text:span><text:span text:style-name="T5">版、</text:span></text:p>
              </text:list-item>
              <text:list-item>
                <text:p text:style-name="P6"><text:span text:style-name="T5">12</text:span><text:span text:style-name="T5">月～：</text:span><text:span text:style-name="T5">ver 0.4 RC, Stable </text:span><text:span text:style-name="T5">版</text:span></text:p>
              </text:list-item>
              <text:list-item>
                <text:p text:style-name="P6"><text:span text:style-name="T5">ver 0.4 </text:span><text:span text:style-name="T5">の目玉のひとつは </text:span><text:span text:style-name="T5">vi/ex </text:span><text:span text:style-name="T5">コマンド</text:span><text:span text:style-name="T5">native</text:span><text:span text:style-name="T5">サポート</text:span></text:p>
              </text:list-item>
              <text:list-item>
                <text:p text:style-name="P6"><text:span text:style-name="T5">vi </text:span><text:span text:style-name="T5">コマンドの挙動が１文字でもずれていると</text:span><text:span text:style-name="T5">Vim</text:span><text:span text:style-name="T5">おじさんが許してくれない→</text:span><text:span text:style-name="T5">Vim</text:span><text:span text:style-name="T5">おじさん対策が必要</text:span></text:p>
              </text:list-item>
              <text:list-item>
                <text:p text:style-name="P6"><text:span text:style-name="T5">デモ：カーソル位置がずれる例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7" draw:layer="layout" svg:width="25.199cm" svg:height="4.086cm" svg:x="1.308cm" svg:y="1cm" presentation:class="title" presentation:user-transformed="true">
          <draw:text-box>
            <text:p text:style-name="P5"><text:span text:style-name="T3">Vim</text:span><text:span text:style-name="T3">おじさんはなぜ</text:span><text:span text:style-name="T3">1</text:span><text:span text:style-name="T3">文字の</text:span><text:span text:style-name="T3"><text:line-break/></text:span><text:span text:style-name="T3">ずれも許してくれないのか？</text:span></text:p>
          </draw:text-box>
        </draw:frame>
        <draw:frame presentation:style-name="pr5" draw:text-style-name="P7" draw:layer="layout" svg:width="25.199cm" svg:height="9.134cm" svg:x="1.4cm" svg:y="5.866cm" presentation:class="outline" presentation:user-transformed="true">
          <draw:text-box>
            <text:list text:style-name="L2">
              <text:list-item>
                <text:p text:style-name="P6"><text:span text:style-name="T5">Vim</text:span><text:span text:style-name="T5">おじさんはカーソル移動時（マウスに持ち替えるなど論外）にどのコマンドを使うか意識していない</text:span></text:p>
              </text:list-item>
              <text:list-item>
                <text:p text:style-name="P6"><text:span text:style-name="T5">移動先を認識するだけで、手が勝手に </text:span><text:span text:style-name="T5">vi </text:span><text:span text:style-name="T5">コマンドを奏でる</text:span></text:p>
              </text:list-item>
              <text:list-item>
                <text:p text:style-name="P6"><text:span text:style-name="T5">ので、カーソル移動が１文字でもズレているのに耐えられない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line-break/></text:span><text:span text:style-name="T4"> </text:span><text:span text:style-name="T4"><text:line-break/></text:span><text:span text:style-name="T3">自動テストの必要性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vi </text:span><text:span text:style-name="T5">コマンド数は膨大、かつ組み合わせが爆発的　（</text:span><text:span text:style-name="T5">operator × motion × count</text:span><text:span text:style-name="T5">）</text:span></text:p>
                <text:list>
                  <text:list-item>
                    <text:p text:style-name="P8"><text:span text:style-name="T5">opetator: c d y &lt; &gt;</text:span></text:p>
                  </text:list-item>
                  <text:list-item>
                    <text:p text:style-name="P8"><text:span text:style-name="T5">motion: h j k l Spc BS w W e E b B 0 ^ $ f F t T , ; / ?</text:span></text:p>
                  </text:list-item>
                </text:list>
              </text:list-item>
              <text:list-item>
                <text:p text:style-name="P6"><text:span text:style-name="T5">カーソル位置が</text:span><text:span text:style-name="T5">1</text:span><text:span text:style-name="T5">文字でもズレると即アウト</text:span></text:p>
              </text:list-item>
              <text:list-item>
                <text:p text:style-name="P6"><text:span text:style-name="T5">超優秀な</text:span><text:span text:style-name="T5">QA</text:span><text:span text:style-name="T5">がいないかぎり、手動テストだけでは無理ゲー</text:span></text:p>
              </text:list-item>
              <text:list-item>
                <text:p text:style-name="P6"><text:span text:style-name="T5">局所的な対処による副作用も心配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8" draw:layer="layout" svg:width="25.199cm" svg:height="3.302cm" svg:x="1.4cm" svg:y="0.292cm" presentation:class="title" presentation:user-transformed="true">
          <draw:text-box>
            <text:p text:style-name="P5"><text:span text:style-name="T4"><text:line-break/></text:span><text:span text:style-name="T4"> </text:span><text:span text:style-name="T4"><text:line-break/></text:span><text:span text:style-name="T3">テストケース書式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6"><text:span text:style-name="T5">テスト名、初期テキスト・カーソル位置 ＋</text:span></text:p>
              </text:list-item>
              <text:list-item>
                <text:p text:style-name="P6"><text:span text:style-name="T5">（</text:span><text:span text:style-name="T5">vi cmd, </text:span><text:span text:style-name="T5">期待されるテキスト・カーソル位置</text:span><text:span text:style-name="T5">, </text:span><text:span text:style-name="T5">）…</text:span></text:p>
              </text:list-item>
              <text:list-item>
                <text:p text:style-name="P6"><text:span text:style-name="T5">カーソル位置を ┃、選択範囲を 《、》 で表現</text:span></text:p>
                <text:p text:style-name="P6"><text:span text:style-name="T5"/></text:p>
              </text:list-item>
            </text:list>
          </draw:text-box>
        </draw:frame>
        <draw:frame draw:style-name="gr2" draw:text-style-name="P9" draw:layer="layout" svg:width="16.611cm" svg:height="5.181cm" svg:x="5.371cm" svg:y="8.819cm">
          <draw:image xlink:href="Pictures/100000000000012A0000005DC61198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9" draw:layer="layout" svg:width="25.199cm" svg:height="2.629cm" svg:x="1.4cm" svg:y="0.628cm" presentation:class="title" presentation:user-transformed="true">
          <draw:text-box>
            <text:p text:style-name="P5"><text:span text:style-name="T3">テストケース作成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基本的に生成</text:span><text:span text:style-name="T5">AI</text:span><text:span text:style-name="T5">に作成してもらう（結構甘い）</text:span></text:p>
              </text:list-item>
              <text:list-item>
                <text:p text:style-name="P6"><text:span text:style-name="T5">Gemini</text:span><text:span text:style-name="T5">先生が作成したテストケースを、チャッピー先生・</text:span><text:span text:style-name="T5">Claude </text:span><text:span text:style-name="T5">先生がレビュー・修正・追加</text:span></text:p>
              </text:list-item>
              <text:list-item>
                <text:p text:style-name="P6"><text:span text:style-name="T5">テスト失敗時も</text:span><text:span text:style-name="T5">AI</text:span><text:span text:style-name="T5">に評価させる（十分な情報表示）</text:span></text:p>
              </text:list-item>
              <text:list-item>
                <text:p text:style-name="P6"><text:span text:style-name="T5">vi/ex </text:span><text:span text:style-name="T5">実装、テストケース、自動テストに誤りがある場合あり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draw:frame presentation:style-name="pr9" draw:layer="layout" svg:width="25.199cm" svg:height="2.629cm" svg:x="1.4cm" svg:y="0.628cm" presentation:class="title" presentation:user-transformed="true">
          <draw:text-box>
            <text:p text:style-name="P5"><text:span text:style-name="T3">テスト結果メッセージ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 text:style-name="P6"><text:span text:style-name="T5">正常時</text:span></text:p>
                <text:list>
                  <text:list-item>
                    <text:p text:style-name="P8"><text:span text:style-name="T5">何をテストしたか、トータルテスト件数表示</text:span></text:p>
                  </text:list-item>
                </text:list>
              </text:list-item>
              <text:list-item>
                <text:p text:style-name="P6"><text:span text:style-name="T5">テスト失敗時</text:span></text:p>
                <text:list>
                  <text:list-item>
                    <text:p text:style-name="P8"><text:span text:style-name="T5">Before: ➔ Commands: ➔ Expected: ➔ Actual: 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draw:style-name="gr2" draw:text-style-name="P9" draw:layer="layout" svg:width="15.743cm" svg:height="5.926cm" svg:x="6.115cm" svg:y="9.574cm">
          <draw:image xlink:href="Pictures/1000000000000253000000E0CA7C98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draw:frame presentation:style-name="pr10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vi</text:span><text:span text:style-name="T5">完全互換は想像以上に難しい・コストを要する</text:span></text:p>
              </text:list-item>
              <text:list-item>
                <text:p text:style-name="P6"><text:span text:style-name="T5">だが自動テストがあると安心して実装できる</text:span></text:p>
              </text:list-item>
              <text:list-item>
                <text:p text:style-name="P6"><text:span text:style-name="T5">Vim</text:span><text:span text:style-name="T5">おじさんがイエローカードを出しにくくなる</text:span></text:p>
              </text:list-item>
              <text:list-item>
                <text:p text:style-name="P6"><text:span text:style-name="T5">Github </text:span><text:span text:style-name="T5">でソース・</text:span><text:span text:style-name="T5">Windows</text:span><text:span text:style-name="T5">バイナリ公開中</text:span></text:p>
                <text:list>
                  <text:list-item>
                    <text:p text:style-name="P8"><text:span text:style-name="T5">ダウンロード＆★よろしくー</text:span></text:p>
                  </text:list-item>
                </text:list>
              </text:list-item>
              <text:list-item>
                <text:p text:style-name="P8"><text:span text:style-name="T5">ご清聴、ありがとうございましたー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draw:frame presentation:style-name="pr10" draw:layer="layout" svg:width="25.199cm" svg:height="2.629cm" svg:x="1.4cm" svg:y="0.628cm" presentation:class="title">
          <draw:text-box>
            <text:p>おまけ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ステルスマーケティングを兼ねて </text:span><text:span text:style-name="T5">Reddit </text:span><text:span text:style-name="T5">に投稿してみた</text:span></text:p>
              </text:list-item>
              <text:list-item>
                <text:p text:style-name="P11"><text:span text:style-name="T5">「 </text:span><text:span text:style-name="T5">Can viMarkdown be built on Linux?</text:span><text:span text:style-name="T5">」</text:span></text:p>
              </text:list-item>
              <text:list-item>
                <text:p text:style-name="P11"><text:span text:style-name="T5">１時間後「 </text:span><text:span text:style-name="T5">It fails to build for me. I created a task on your github. </text:span><text:span text:style-name="T5">」</text:span></text:p>
              </text:list-item>
              <text:list-item>
                <text:p text:style-name="P11"><text:span text:style-name="T5">２時間後「 <text:s/></text:span><text:span text:style-name="T5">I got it to build. I'll make a PR <text:s/></text:span><text:span text:style-name="T5">」</text:span></text:p>
              </text:list-item>
              <text:list-item>
                <text:p text:style-name="P11"><text:span text:style-name="T5">「 </text:span><text:span text:style-name="T5">I did actually try running it - I might actually use it! </text:span><text:span text:style-name="T5">」</text:span></text:p>
              </text:list-item>
              <text:list-item>
                <text:p text:style-name="P11"><text:span text:style-name="T5">2.7K views, 4</text:span><text:span text:style-name="T5">いいね</text:span><text:span text:style-name="T5">, 13</text:span><text:span text:style-name="T5">コメント</text:span></text:p>
              </text:list-item>
              <text:list-item>
                <text:p text:style-name="P12"><text:span text:style-name="T5">ステルスマーケティング 大成功！</text:span></text:p>
                <text:p text:style-name="P6"><text:span text:style-name="T4"/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7-12T09:44:29.393634000</dc:date>
    <meta:editing-duration>PT17H50M49S</meta:editing-duration>
    <meta:editing-cycles>25</meta:editing-cycles>
    <meta:generator>LibreOffice/26.2.4.2$Windows_X86_64 LibreOffice_project/0229ac93fcf0d7cbc6376066c6f35021cef002dc</meta:generator>
    <meta:print-date>2026-07-07T09:56:06.271779800</meta:print-date>
    <meta:printed-by>PDFファイル</meta:printed-by>
    <meta:document-statistic meta:object-count="69"/>
  </office:meta>
</office:document-meta>
</file>
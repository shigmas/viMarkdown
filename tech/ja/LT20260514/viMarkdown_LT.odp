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C300000410ED0387BC.png" manifest:media-type="image/png"/>
  <manifest:file-entry manifest:full-path="Pictures/10000000000000C200000110AD3833FE.png" manifest:media-type="image/png"/>
  <manifest:file-entry manifest:full-path="Pictures/10000000000002E2000000C2D7F75694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Deep_20_Ocean" draw:gradient-step-count="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ffffff" draw:fill-gradient-name="Gradient_20_1" draw:gradient-step-count="0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gradient" draw:fill-color="#ffffff" draw:fill-gradient-name="Green_20_Grass" draw:gradient-step-count="0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 style:list-style-name="L4">
      <style:graphic-properties draw:fill-color="#ffffff" draw:auto-grow-height="true" fo:min-height="18.925cm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draw:auto-grow-height="false" fo:min-height="13.365cm" loext:decorative="false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color="#ffffff" loext:opacity="100%" fo:font-size="44pt">
        <loext:char-complex-color loext:theme-type="dark1" loext:color-type="theme"/>
      </style:text-properties>
    </style:style>
    <style:style style:name="P4" style:family="paragraph">
      <style:paragraph-properties fo:margin-left="0cm" fo:margin-right="0cm" fo:margin-top="0.226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-color="#ffffff"/>
      <style:paragraph-properties fo:margin-left="0cm" fo:margin-right="0cm" fo:margin-top="0.226cm" fo:margin-bottom="0cm" fo:line-height="100%" fo:text-align="center" fo:text-indent="0cm" style:punctuation-wrap="hanging" loext:tab-stop-distance="1.27cm">
        <style:tab-stops>
          <style:tab-stop style:position="0cm"/>
        </style:tab-stops>
      </style:paragraph-properties>
      <style:text-properties fo:color="#ffffff" loext:opacity="100%" fo:font-size="32pt" fo:hyphenate="false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color="#ffffff" loext:opacity="100%" fo:font-size="44pt">
        <loext:char-complex-color loext:theme-type="dark1" loext:color-type="theme"/>
      </style:text-properties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color="#ffffff" loext:opacity="100%" fo:font-size="32pt">
        <loext:char-complex-color loext:theme-type="dark1" loext:color-type="theme"/>
      </style:text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2" style:family="paragraph">
      <style:paragraph-properties fo:margin-left="0cm" fo:margin-right="0cm" fo:margin-top="0.42cm" fo:margin-bottom="0.35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3" style:family="paragraph">
      <style:paragraph-properties loext:tab-stop-distance="1.27cm">
        <style:tab-stops/>
      </style:paragraph-properties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.226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solid" style:text-line-through-type="singl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左で書いて右で見る。でも右でも直したい。&#10;ので viMarkdown 作った" draw:style-name="dp1" draw:master-page-name="Title_20_Slide" presentation:presentation-page-layout-name="AL1T32">
        <office:forms form:automatic-focus="false" form:apply-design-mode="false"/>
        <draw:frame draw:name="Title 1" presentation:style-name="pr1" draw:text-style-name="P3" draw:layer="layout" svg:width="21.589cm" svg:height="4.082cm" svg:x="1.905cm" svg:y="5.918cm" presentation:class="title">
          <draw:text-box>
            <text:p text:style-name="P1"><text:span text:style-name="T1">左で書いて右で見る</text:span><text:span text:style-name="T1"><text:line-break/></text:span><text:span text:style-name="T1">でも右でも直したい</text:span></text:p>
            <text:p text:style-name="P2"><text:span text:style-name="T1">ので </text:span><text:span text:style-name="T1">viMarkdown </text:span><text:span text:style-name="T1">作った</text:span></text:p>
          </draw:text-box>
        </draw:frame>
        <draw:frame presentation:style-name="pr2" draw:text-style-name="P5" draw:layer="layout" svg:width="21.589cm" svg:height="18.925cm" svg:x="2cm" svg:y="5cm" presentation:class="subtitle" presentation:user-transformed="true">
          <draw:text-box>
            <text:p text:style-name="P4"><text:span text:style-name="T2">N.Tsuda (vivisuke)</text:span></text:p>
            <text:p text:style-name="P4"><text:span text:style-name="T2">自宅研究員（首席）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発表の目的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2.859cm" svg:height="3.174cm" svg:x="1.27cm" svg:y="0.763cm" presentation:class="title" presentation:user-transformed="true">
          <draw:text-box>
            <text:p text:style-name="P2"><text:span text:style-name="T1">発表の目的</text:span></text:p>
          </draw:text-box>
        </draw:frame>
        <draw:frame draw:name="Content Placeholder 2" presentation:style-name="pr5" draw:text-style-name="P9" draw:layer="layout" svg:width="22.859cm" svg:height="6.055cm" svg:x="1.27cm" svg:y="4.445cm" presentation:class="outline" presentation:user-transformed="true">
          <draw:text-box>
            <text:p text:style-name="P8"><text:span text:style-name="T3">マークダウンエディタを作ってみたので</text:span></text:p>
            <text:p text:style-name="P8"><text:span text:style-name="T3">反応が知りたくて登壇してみた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目次" draw:style-name="dp3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目次</text:span></text:p>
          </draw:text-box>
        </draw:frame>
        <draw:frame draw:name="Content Placeholder 2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基本機能</text:span><text:span text:style-name="T6">（</text:span><text:span text:style-name="T6">3</text:span><text:span text:style-name="T6">分）</text:span></text:p>
              </text:list-item>
              <text:list-item>
                <text:p text:style-name="P8"><text:span text:style-name="T5">独自機能</text:span><text:span text:style-name="T6">（</text:span><text:span text:style-name="T6">3</text:span><text:span text:style-name="T6">分）</text:span></text:p>
              </text:list-item>
              <text:list-item>
                <text:p text:style-name="P8"><text:span text:style-name="T5">現状、今後</text:span><text:span text:style-name="T6">（</text:span><text:span text:style-name="T6">3</text:span><text:span text:style-name="T6">分）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現状" draw:style-name="dp4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Markdown </text:span><text:span text:style-name="T4">とは</text:span></text:p>
          </draw:text-box>
        </draw:frame>
        <draw:frame draw:name="Content Placeholder 2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2"><text:span text:style-name="T6">軽量マークアップ言語のひとつ</text:span></text:p>
              </text:list-item>
              <text:list-item>
                <text:p text:style-name="P12"><text:span text:style-name="T6">プレインテキストなので </text:span><text:span text:style-name="T6">diff, grep </text:span><text:span text:style-name="T6">可</text:span></text:p>
              </text:list-item>
              <text:list-item>
                <text:p text:style-name="P12"><text:span text:style-name="T6">直感的で書きやすい</text:span></text:p>
              </text:list-item>
              <text:list-item>
                <text:p text:style-name="P12"><text:span text:style-name="T6">エンジニア界隈の「標準言語」</text:span></text:p>
                <text:list>
                  <text:list-item>
                    <text:p text:style-name="P13"><text:span text:style-name="T6">Github, Qiita, Zenn, VS Code </text:span><text:span text:style-name="T6">など採用</text:span></text:p>
                  </text:list-item>
                </text:list>
              </text:list-item>
              <text:list-item>
                <text:p text:style-name="P12"><text:span text:style-name="T6">「プレーンテキストの扱いやすさ」と「リッチな表現力（</text:span><text:span text:style-name="T6">HTML</text:span><text:span text:style-name="T6">等）」 を両立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基本機能" draw:style-name="dp4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viMarkdown </text:span><text:span text:style-name="T4">基本機能</text:span></text:p>
          </draw:text-box>
        </draw:frame>
        <draw:frame draw:name="Content Placeholder 2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6">エディタ・プレビュー方式</text:span></text:p>
              </text:list-item>
              <text:list-item>
                <text:p text:style-name="P8"><text:span text:style-name="T6">CommonMark / GFM </text:span><text:span text:style-name="T6">準拠</text:span></text:p>
              </text:list-item>
              <text:list-item>
                <text:p text:style-name="P8"><text:span text:style-name="T6">軽量・高速</text:span></text:p>
              </text:list-item>
            </text:list>
          </draw:text-box>
        </draw:frame>
        <draw:frame draw:style-name="gr2" draw:text-style-name="P14" draw:layer="layout" svg:width="14cm" svg:height="8.411cm" svg:x="5.5cm" svg:y="9.5cm">
          <draw:image xlink:href="Pictures/10000000000006C300000410ED0387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独自機能" draw:style-name="dp4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ViMarkdown </text:span><text:span text:style-name="T4">独自機能 </text:span><text:span text:style-name="T4">(1)</text:span></text:p>
          </draw:text-box>
        </draw:frame>
        <draw:frame draw:name="Content Placeholder 2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6">罫線ブロック</text:span></text:p>
              </text:list-item>
              <text:list-item>
                <text:p text:style-name="P8"><text:span text:style-name="T6">CSV</text:span><text:span text:style-name="T6">ブロック</text:span></text:p>
              </text:list-item>
            </text:list>
            <text:p text:style-name="P8"><text:span text:style-name="T6"/></text:p>
            <text:list text:continue-numbering="true" text:style-name="L2">
              <text:list-header>
                <text:p text:style-name="P8"><text:span text:style-name="T6"/></text:p>
              </text:list-header>
            </text:list>
          </draw:text-box>
        </draw:frame>
        <draw:frame draw:style-name="gr2" draw:text-style-name="P14" draw:layer="layout" svg:width="5.132cm" svg:height="7.196cm" svg:x="10.148cm" svg:y="7.5cm">
          <draw:image xlink:href="Pictures/10000000000000C200000110AD3833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Title_20_and_20_Content" presentation:presentation-page-layout-name="AL2T11">
        <office:forms form:automatic-focus="false" form:apply-design-mode="false"/>
        <draw:frame draw:name="Title 4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独自機能 </text:span><text:span text:style-name="T4">(2)</text:span></text:p>
          </draw:text-box>
        </draw:frame>
        <draw:frame draw:name="Content Placeholder 4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6">エディタで編集し、プレビューで確認</text:span></text:p>
                <text:p text:style-name="P8"><text:span text:style-name="T6">→ プレビューで編集したくなるよね</text:span></text:p>
                <text:p text:style-name="P8"><text:span text:style-name="T6">→ プレビュー内編集機能（限定的）実装</text:span></text:p>
              </text:list-item>
              <text:list-item>
                <text:p text:style-name="P13"><text:span text:style-name="T6">カーソル位置同期を実装すれば</text:span></text:p>
                <text:p text:style-name="P8"><text:span text:style-name="T5">→ </text:span><text:span text:style-name="T6">プレビュー入力をエディタに挿入</text:span></text:p>
              </text:list-item>
              <text:list-item>
                <text:p text:style-name="P13"><text:span text:style-name="T6">多くのエッジケース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Title_20_and_20_Content" presentation:presentation-page-layout-name="AL2T11">
        <office:forms form:automatic-focus="false" form:apply-design-mode="false"/>
        <draw:frame draw:name="Title 2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現状 </text:span><text:span text:style-name="T4">(1)</text:span></text:p>
          </draw:text-box>
        </draw:frame>
        <draw:frame draw:name="Content Placeholder 1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6">2025</text:span><text:span text:style-name="T6">年末から忘年会のノリで開発開始</text:span></text:p>
                <text:list>
                  <text:list-item>
                    <text:p text:style-name="P13"><text:span text:style-name="T6">Qiita, Zenn</text:span></text:p>
                  </text:list-item>
                </text:list>
              </text:list-item>
              <text:list-item>
                <text:p text:style-name="P8"><text:span text:style-name="T6">Github</text:span><text:span text:style-name="T6">にてソース公開（★</text:span><text:span text:style-name="T6">19</text:span><text:span text:style-name="T6">）</text:span></text:p>
                <text:list>
                  <text:list-item>
                    <text:p text:style-name="P13"><text:span text:style-name="T6">https://github.com/vivisuke/viMarkdown</text:span></text:p>
                  </text:list-item>
                </text:list>
              </text:list-item>
              <text:list-item>
                <text:p text:style-name="P8"><text:span text:style-name="T6">窓の杜アップデートに掲載</text:span></text:p>
                <text:list>
                  <text:list-item>
                    <text:p text:style-name="P13"><text:span text:style-name="T6">https://forest.watch.impress.co.jp/category/other/topic/update/</text:span></text:p>
                  </text:list-item>
                </text:list>
                <text:p text:style-name="P8"><text:span text:style-name="T6"/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Title_20_and_20_Content" presentation:presentation-page-layout-name="AL2T11">
        <office:forms form:automatic-focus="false" form:apply-design-mode="false"/>
        <draw:frame draw:name="Title 3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現状 </text:span><text:span text:style-name="T4">(2)</text:span></text:p>
          </draw:text-box>
        </draw:frame>
        <draw:frame draw:name="Content Placeholder 3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6">2026</text:span><text:span text:style-name="T6">年</text:span><text:span text:style-name="T6">4</text:span><text:span text:style-name="T6">月末 </text:span><text:span text:style-name="T6">ver0.2 </text:span><text:span text:style-name="T6">安定版リリース</text:span></text:p>
              </text:list-item>
              <text:list-item>
                <text:p text:style-name="P8"><text:span text:style-name="T6">累計ダウンロード数：約</text:span><text:span text:style-name="T6">700</text:span></text:p>
                <text:list>
                  <text:list-item>
                    <text:p text:style-name="P13"><text:span text:style-name="T6"/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9.527cm" svg:height="5.132cm" svg:x="2.95cm" svg:y="8.368cm">
          <draw:image xlink:href="Pictures/10000000000002E2000000C2D7F75694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今後" draw:style-name="dp4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今後 </text:span><text:span text:style-name="T4">(ver 0.3/0.4)</text:span></text:p>
          </draw:text-box>
        </draw:frame>
        <draw:frame draw:name="Content Placeholder 2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6">vi</text:span><text:span text:style-name="T6">コマンド</text:span></text:p>
              </text:list-item>
              <text:list-item>
                <text:p text:style-name="P8"><text:span text:style-name="T7">CMake</text:span><text:span text:style-name="T7">化</text:span><text:span text:style-name="T6">、</text:span><text:span text:style-name="T6">MacOS</text:span><text:span text:style-name="T6">対応</text:span></text:p>
              </text:list-item>
              <text:list-item>
                <text:p text:style-name="P8"><text:span text:style-name="T7">多言語対応（日英）</text:span></text:p>
              </text:list-item>
              <text:list-item>
                <text:p text:style-name="P8"><text:span text:style-name="T6">正規表現検索 </text:span><text:span text:style-name="T6">/ grep</text:span><text:span text:style-name="T6">、</text:span><text:span text:style-name="T6">SVG</text:span></text:p>
              </text:list-item>
              <text:list-item>
                <text:p text:style-name="P8"><text:span text:style-name="T5">品質</text:span><text:span text:style-name="T6">向上</text:span></text:p>
              </text:list-item>
              <text:list-item>
                <text:p text:style-name="P8"><text:span text:style-name="T6">パフォーマンス向上（差分パース）</text:span></text:p>
              </text:list-item>
              <text:list-item>
                <text:p text:style-name="P8"><text:span text:style-name="T6">使い勝手改善</text:span></text:p>
              </text:list-item>
              <text:list-item>
                <text:p text:style-name="P8"><text:span text:style-name="T6">ワールドワイド進出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目標" draw:style-name="dp4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2026</text:span><text:span text:style-name="T4">年末</text:span><text:span text:style-name="T6"> </text:span><text:span text:style-name="T4">目標</text:span></text:p>
          </draw:text-box>
        </draw:frame>
        <draw:frame draw:name="Content Placeholder 2" presentation:style-name="pr7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6"><text:s/>ver0.4 </text:span><text:span text:style-name="T6">リリース</text:span></text:p>
              </text:list-item>
              <text:list-item>
                <text:p text:style-name="P8"><text:span text:style-name="T6">累計ダウンロード</text:span><text:span text:style-name="T6">: 2,500</text:span></text:p>
              </text:list-item>
            </text:list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15"><text:span text:style-name="T6">ご清聴ありがとうございました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gradient draw:name="Gradient_20_1" draw:display-name="Gradient 1" draw:style="ellipsoid" draw:cx="50%" draw:cy="50%" draw:start-color="#127622" draw:end-color="#d4ea6b" draw:start-intensity="100%" draw:end-intensity="100%" draw:angle="0deg" draw:border="15%">
      <loext:gradient-stop svg:offset="0" loext:color-type="rgb" loext:color-value="#127622"/>
      <loext:gradient-stop svg:offset="1" loext:color-type="rgb" loext:color-value="#d4ea6b"/>
    </draw:gradient>
    <draw:gradient draw:name="Green_20_Grass" draw:display-name="Green Grass" draw:style="linear" draw:start-color="#ffff00" draw:end-color="#81d41a" draw:start-intensity="100%" draw:end-intensity="100%" draw:angle="30deg" draw:border="0%">
      <loext:gradient-stop svg:offset="0" loext:color-type="rgb" loext:color-value="#ffff00"/>
      <loext:gradient-stop svg:offset="1" loext:color-type="rgb" loext:color-value="#81d41a"/>
    </draw:gradient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22.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escription>generated using python-pptx</dc:description>
    <meta:editing-cycles>17</meta:editing-cycles>
    <meta:creation-date>2013-01-27T09:14:16</meta:creation-date>
    <dc:date>2026-05-14T14:08:37.570962500</dc:date>
    <meta:editing-duration>PT8H17M5S</meta:editing-duration>
    <meta:generator>LibreOffice/25.8.6.2$Windows_X86_64 LibreOffice_project/b4b39682cd9868fa725bc664aff94278d315bd04</meta:generator>
    <meta:print-date>2026-05-14T08:25:53.873251900</meta:print-date>
    <meta:printed-by>PDFファイル</meta:printed-by>
    <meta:document-statistic meta:object-count="184"/>
    <meta:user-defined meta:name="AppVersion">14.0000</meta:user-defined>
    <meta:user-defined meta:name="PresentationFormat">On-screen Show (4:3)</meta:user-defined>
  </office:meta>
</office:document-meta>
</file>
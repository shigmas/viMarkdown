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B000000F72691735E.png" manifest:media-type="image/png"/>
  <manifest:file-entry manifest:full-path="Pictures/10000000000006C300000410ED0387BC.png" manifest:media-type="image/png"/>
  <manifest:file-entry manifest:full-path="Pictures/10000000000000C200000110AD3833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Deep_20_Ocean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1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een_20_Grass" draw:gradient-step-count="0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4">
      <style:graphic-properties draw:fill-color="#ffffff" draw:auto-grow-height="true" fo:min-height="18.92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loext:opacity="100%" fo:font-size="32pt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style:paragraph-properties loext:tab-stop-distance="1.27cm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左で書いて右で見る。でも右でも直したい。&#10;ので viMarkdown 作った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3" draw:layer="layout" svg:width="21.589cm" svg:height="4.082cm" svg:x="1.905cm" svg:y="5.918cm" presentation:class="title">
          <draw:text-box>
            <text:p text:style-name="P1"><text:span text:style-name="T1">左で書いて右で見る</text:span><text:span text:style-name="T1"><text:line-break/></text:span><text:span text:style-name="T1">でも右でも直したい</text:span></text:p>
            <text:p text:style-name="P2"><text:span text:style-name="T1">ので </text:span><text:span text:style-name="T1">viMarkdown </text:span><text:span text:style-name="T1">作った</text:span></text:p>
          </draw:text-box>
        </draw:frame>
        <draw:frame presentation:style-name="pr2" draw:text-style-name="P5" draw:layer="layout" svg:width="21.589cm" svg:height="18.925cm" svg:x="2cm" svg:y="5cm" presentation:class="subtitle" presentation:user-transformed="true">
          <draw:text-box>
            <text:p text:style-name="P4"><text:span text:style-name="T2">N.Tsuda (vivisuke)</text:span></text:p>
            <text:p text:style-name="P4"><text:span text:style-name="T2">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発表の目的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2"><text:span text:style-name="T1">発表の目的</text:span></text:p>
          </draw:text-box>
        </draw:frame>
        <draw:frame draw:name="Content Placeholder 2" presentation:style-name="pr5" draw:text-style-name="P9" draw:layer="layout" svg:width="22.859cm" svg:height="6.055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マークダウンエディタを作ってみたので</text:span></text:p>
              </text:list-item>
              <text:list-item>
                <text:p text:style-name="P8"><text:span text:style-name="T3">反応が知りたくて登壇してみ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次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基本機能</text:span><text:span text:style-name="T6">（</text:span><text:span text:style-name="T6">3</text:span><text:span text:style-name="T6">分）</text:span></text:p>
              </text:list-item>
              <text:list-item>
                <text:p text:style-name="P8"><text:span text:style-name="T5">独自機能</text:span><text:span text:style-name="T6">（</text:span><text:span text:style-name="T6">3</text:span><text:span text:style-name="T6">分）</text:span></text:p>
              </text:list-item>
              <text:list-item>
                <text:p text:style-name="P8"><text:span text:style-name="T5">現状・今後</text:span><text:span text:style-name="T6">（</text:span><text:span text:style-name="T6">3</text:span><text:span text:style-name="T6">分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現状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Markdown </text:span><text:span text:style-name="T4">とは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6">軽量マークアップ言語のひとつ</text:span></text:p>
              </text:list-item>
              <text:list-item>
                <text:p text:style-name="P12"><text:span text:style-name="T6">直感的で書きやすい</text:span></text:p>
              </text:list-item>
              <text:list-item>
                <text:p text:style-name="P12"><text:span text:style-name="T6">エンジニア界隈の「標準言語」</text:span></text:p>
                <text:list>
                  <text:list-item>
                    <text:p text:style-name="P13"><text:span text:style-name="T6">Github, Qiita, Zenn, VS Code </text:span><text:span text:style-name="T6">など採用</text:span></text:p>
                  </text:list-item>
                </text:list>
              </text:list-item>
              <text:list-item>
                <text:p text:style-name="P12"><text:span text:style-name="T6">「プレーンテキストの読みやすさ」と「リッチな表現力（</text:span><text:span text:style-name="T6">HTML</text:span><text:span text:style-name="T6">等）」 を両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基本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基本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エディタ・プレビュー方式</text:span></text:p>
              </text:list-item>
              <text:list-item>
                <text:p text:style-name="P8"><text:span text:style-name="T6">CommonMark / GFM </text:span><text:span text:style-name="T6">準拠</text:span></text:p>
              </text:list-item>
              <text:list-item>
                <text:p text:style-name="P8"><text:span text:style-name="T6">軽量・高速</text:span></text:p>
              </text:list-item>
            </text:list>
          </draw:text-box>
        </draw:frame>
        <draw:frame draw:style-name="gr2" draw:text-style-name="P14" draw:layer="layout" svg:width="14cm" svg:height="8.411cm" svg:x="5.5cm" svg:y="9.5cm">
          <draw:image xlink:href="Pictures/10000000000006C300000410ED038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独自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 </text:span><text:span text:style-name="T4">(1)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罫線ブロック</text:span></text:p>
              </text:list-item>
              <text:list-item>
                <text:p text:style-name="P8"><text:span text:style-name="T6">CSV</text:span><text:span text:style-name="T6">ブロック</text:span></text:p>
              </text:list-item>
            </text:list>
            <text:p text:style-name="P8"><text:span text:style-name="T6"/></text:p>
            <text:list text:continue-numbering="true" text:style-name="L2">
              <text:list-header>
                <text:p text:style-name="P8"><text:span text:style-name="T6"/></text:p>
              </text:list-header>
            </text:list>
          </draw:text-box>
        </draw:frame>
        <draw:frame draw:style-name="gr2" draw:text-style-name="P14" draw:layer="layout" svg:width="5.132cm" svg:height="7.196cm" svg:x="10.148cm" svg:y="7.5cm">
          <draw:image xlink:href="Pictures/10000000000000C200000110AD3833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 </text:span><text:span text:style-name="T4">(2)</text:span></text:p>
          </draw:text-box>
        </draw:frame>
        <draw:frame draw:name="Content Placeholder 4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エディタで編集し、プレビューで確認</text:span></text:p>
                <text:p text:style-name="P8"><text:span text:style-name="T6">→ プレビューで編集したくなるよね</text:span></text:p>
                <text:p text:style-name="P8"><text:span text:style-name="T6">→ プレビュー内編集機能（限定的）実装</text:span></text:p>
              </text:list-item>
              <text:list-item>
                <text:p text:style-name="P13"><text:span text:style-name="T6">カーソル位置同期を実装すれば</text:span></text:p>
                <text:p text:style-name="P8"><text:span text:style-name="T5">→ </text:span><text:span text:style-name="T6">プレビュー入力をエディタに挿入</text:span></text:p>
              </text:list-item>
              <text:list-item>
                <text:p text:style-name="P13"><text:span text:style-name="T6">多くのエッジケー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 </text:span><text:span text:style-name="T4">(1)</text:span></text:p>
          </draw:text-box>
        </draw:frame>
        <draw:frame draw:name="Content Placeholder 1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2025</text:span><text:span text:style-name="T6">年末から忘年会のノリで開発開始</text:span></text:p>
                <text:list>
                  <text:list-item>
                    <text:p text:style-name="P13"><text:span text:style-name="T6">Qiita, Zenn</text:span></text:p>
                  </text:list-item>
                </text:list>
              </text:list-item>
              <text:list-item>
                <text:p text:style-name="P8"><text:span text:style-name="T6">Github</text:span><text:span text:style-name="T6">にてソース公開（★</text:span><text:span text:style-name="T6">19</text:span><text:span text:style-name="T6">）</text:span></text:p>
                <text:list>
                  <text:list-item>
                    <text:p text:style-name="P13"><text:span text:style-name="T6">https://github.com/vivisuke/viMarkdown</text:span></text:p>
                  </text:list-item>
                </text:list>
              </text:list-item>
              <text:list-item>
                <text:p text:style-name="P8"><text:span text:style-name="T6">窓の杜アップデートに掲載</text:span></text:p>
                <text:list>
                  <text:list-item>
                    <text:p text:style-name="P13"><text:span text:style-name="T6">https://forest.watch.impress.co.jp/category/other/topic/update/</text:span></text:p>
                  </text:list-item>
                </text:list>
                <text:p text:style-name="P8"><text:span text:style-name="T6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 </text:span><text:span text:style-name="T4">(2)</text:span></text:p>
          </draw:text-box>
        </draw:frame>
        <draw:frame draw:name="Content Placeholder 3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2026</text:span><text:span text:style-name="T6">年</text:span><text:span text:style-name="T6">4</text:span><text:span text:style-name="T6">月末 </text:span><text:span text:style-name="T6">ver0.2 </text:span><text:span text:style-name="T6">安定版リリース</text:span></text:p>
              </text:list-item>
              <text:list-item>
                <text:p text:style-name="P8"><text:span text:style-name="T6">累計ダウンロード数：約</text:span><text:span text:style-name="T6">700</text:span></text:p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20.189cm" svg:height="6.535cm" svg:x="2.619cm" svg:y="7.697cm">
          <draw:image xlink:href="Pictures/10000000000002FB000000F72691735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今後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今後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vi</text:span><text:span text:style-name="T6">コマンド</text:span></text:p>
              </text:list-item>
              <text:list-item>
                <text:p text:style-name="P8"><text:span text:style-name="T7">CMake</text:span><text:span text:style-name="T7">化</text:span><text:span text:style-name="T6">、</text:span><text:span text:style-name="T6">MacOS</text:span><text:span text:style-name="T6">対応</text:span></text:p>
              </text:list-item>
              <text:list-item>
                <text:p text:style-name="P8"><text:span text:style-name="T7">多言語対応（日英）</text:span></text:p>
              </text:list-item>
              <text:list-item>
                <text:p text:style-name="P8"><text:span text:style-name="T6">正規表現検索 </text:span><text:span text:style-name="T6">/ grep</text:span></text:p>
              </text:list-item>
              <text:list-item>
                <text:p text:style-name="P8"><text:span text:style-name="T6">SVG</text:span></text:p>
              </text:list-item>
              <text:list-item>
                <text:p text:style-name="P8"><text:span text:style-name="T6">パフォーマンス</text:span><text:span text:style-name="T6">, </text:span><text:span text:style-name="T6">品質向上</text:span></text:p>
              </text:list-item>
              <text:list-item>
                <text:p text:style-name="P8"><text:span text:style-name="T6">使い勝手改善</text:span></text:p>
              </text:list-item>
              <text:list-item>
                <text:p text:style-name="P8"><text:span text:style-name="T6">ワールドワイド進出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標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標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2026</text:span><text:span text:style-name="T6">年末 </text:span><text:span text:style-name="T6">ver0.4 </text:span><text:span text:style-name="T6">リリース</text:span></text:p>
              </text:list-item>
              <text:list-item>
                <text:p text:style-name="P8"><text:span text:style-name="T6">累計ダウンロード</text:span><text:span text:style-name="T6">: 2,5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ellipsoid" draw:cx="50%" draw:cy="50%" draw:start-color="#127622" draw:end-color="#d4ea6b" draw:start-intensity="100%" draw:end-intensity="100%" draw:angle="0deg" draw:border="15%">
      <loext:gradient-stop svg:offset="0" loext:color-type="rgb" loext:color-value="#127622"/>
      <loext:gradient-stop svg:offset="1" loext:color-type="rgb" loext:color-value="#d4ea6b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9</meta:editing-cycles>
    <meta:creation-date>2013-01-27T09:14:16</meta:creation-date>
    <dc:date>2026-05-14T07:22:18.633741000</dc:date>
    <meta:editing-duration>PT3H10M42S</meta:editing-duration>
    <meta:generator>LibreOffice/25.8.6.2$Windows_X86_64 LibreOffice_project/b4b39682cd9868fa725bc664aff94278d315bd04</meta:generator>
    <meta:print-date>2026-05-14T02:34:28.908269600</meta:print-date>
    <meta:document-statistic meta:object-count="184"/>
    <meta:user-defined meta:name="AppVersion">14.0000</meta:user-defined>
    <meta:user-defined meta:name="PresentationFormat">On-screen Show (4:3)</meta:user-defined>
  </office:meta>
</office:document-meta>
</file>
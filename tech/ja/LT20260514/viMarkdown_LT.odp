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300000410ED0387BC.png" manifest:media-type="image/png"/>
  <manifest:file-entry manifest:full-path="Pictures/10000000000002FB000000F72691735E.png" manifest:media-type="image/png"/>
  <manifest:file-entry manifest:full-path="Pictures/10000000000000C200000110AD3833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4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13" style:family="paragraph">
      <style:paragraph-properties loext:tab-stop-distance="1.27cm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マークダウンエディタを作ってみたので</text:span></text:p>
              </text:list-item>
              <text:list-item>
                <text:p text:style-name="P8"><text:span text:style-name="T3">反応が知りたくて登壇してみ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次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現状（</text:span><text:span text:style-name="T5">1</text:span><text:span text:style-name="T5">分）</text:span></text:p>
              </text:list-item>
              <text:list-item>
                <text:p text:style-name="P8"><text:span text:style-name="T6">基本機能</text:span><text:span text:style-name="T5">（</text:span><text:span text:style-name="T5">1.5</text:span><text:span text:style-name="T5">分）</text:span></text:p>
              </text:list-item>
              <text:list-item>
                <text:p text:style-name="P8"><text:span text:style-name="T6">独自機能</text:span><text:span text:style-name="T5">（</text:span><text:span text:style-name="T5">1.5</text:span><text:span text:style-name="T5">分）</text:span></text:p>
              </text:list-item>
              <text:list-item>
                <text:p text:style-name="P8"><text:span text:style-name="T6">今後</text:span><text:span text:style-name="T5">（</text:span><text:span text:style-name="T5">1</text:span><text:span text:style-name="T5">分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Markdown </text:span><text:span text:style-name="T4">とは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5">軽量マークアップ言語のひとつ</text:span></text:p>
              </text:list-item>
              <text:list-item>
                <text:p text:style-name="P12"><text:span text:style-name="T5">直感的で書きやすい</text:span></text:p>
              </text:list-item>
              <text:list-item>
                <text:p text:style-name="P12"><text:span text:style-name="T5">エンジニア界隈の「標準言語」</text:span></text:p>
                <text:list>
                  <text:list-item>
                    <text:p text:style-name="P13"><text:span text:style-name="T5">Github, Qiita, Zenn, VS Code </text:span><text:span text:style-name="T5">など採用</text:span></text:p>
                  </text:list-item>
                </text:list>
              </text:list-item>
              <text:list-item>
                <text:p text:style-name="P12"><text:span text:style-name="T5">「プレーンテキストの読みやすさ」と「リッチな表現力（</text:span><text:span text:style-name="T5">HTML</text:span><text:span text:style-name="T5">等）」 を両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</text:span></text:p>
          </draw:text-box>
        </draw:frame>
        <draw:frame draw:name="Content Placeholder 5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5</text:span><text:span text:style-name="T5">年末から忘年会のノリで開発開始</text:span></text:p>
              </text:list-item>
              <text:list-item>
                <text:p text:style-name="P8"><text:span text:style-name="T5">Github</text:span><text:span text:style-name="T5">にてソース公開（★</text:span><text:span text:style-name="T5">18</text:span><text:span text:style-name="T5">）</text:span></text:p>
              </text:list-item>
              <text:list-item>
                <text:p text:style-name="P8"><text:span text:style-name="T5">窓の杜アップデートに掲載</text:span></text:p>
              </text:list-item>
              <text:list-item>
                <text:p text:style-name="P8"><text:span text:style-name="T5">2026</text:span><text:span text:style-name="T5">年</text:span><text:span text:style-name="T5">4</text:span><text:span text:style-name="T5">月末 </text:span><text:span text:style-name="T5">ver0.2 </text:span><text:span text:style-name="T5">安定版リリース</text:span></text:p>
              </text:list-item>
              <text:list-item>
                <text:p text:style-name="P8"><text:span text:style-name="T5">累計ダウンロード数：約</text:span><text:span text:style-name="T5">700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（２）</text:span></text:p>
          </draw:text-box>
        </draw:frame>
        <draw:frame draw:name="Content Placeholder 1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5</text:span><text:span text:style-name="T5">年末から忘年会のノリで開発開始</text:span></text:p>
                <text:list>
                  <text:list-item>
                    <text:p text:style-name="P13"><text:span text:style-name="T5">Qiita, Zenn</text:span></text:p>
                  </text:list-item>
                </text:list>
              </text:list-item>
              <text:list-item>
                <text:p text:style-name="P8"><text:span text:style-name="T5">Github</text:span><text:span text:style-name="T5">にてソース公開</text:span></text:p>
                <text:list>
                  <text:list-item>
                    <text:p text:style-name="P13"><text:span text:style-name="T5">https://github.com/vivisuke/viMarkdown</text:span></text:p>
                  </text:list-item>
                </text:list>
              </text:list-item>
              <text:list-item>
                <text:p text:style-name="P8"><text:span text:style-name="T5">窓の杜アップデートに掲載</text:span></text:p>
                <text:list>
                  <text:list-item>
                    <text:p text:style-name="P13"><text:span text:style-name="T5">https://forest.watch.impress.co.jp/category/other/topic/update/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（３）</text:span></text:p>
          </draw:text-box>
        </draw:frame>
        <draw:frame draw:name="Content Placeholder 3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6</text:span><text:span text:style-name="T5">年</text:span><text:span text:style-name="T5">4</text:span><text:span text:style-name="T5">月末 </text:span><text:span text:style-name="T5">ver0.2 </text:span><text:span text:style-name="T5">安定版リリース</text:span></text:p>
              </text:list-item>
              <text:list-item>
                <text:p text:style-name="P8"><text:span text:style-name="T5">累計ダウンロード数：約</text:span><text:span text:style-name="T5">700</text:span></text:p>
                <text:list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20.189cm" svg:height="6.535cm" svg:x="2.619cm" svg:y="7.697cm">
          <draw:image xlink:href="Pictures/10000000000002FB000000F7269173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基本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エディタ・プレビュー方式</text:span></text:p>
              </text:list-item>
              <text:list-item>
                <text:p text:style-name="P8"><text:span text:style-name="T5">CommonMark / GFM </text:span><text:span text:style-name="T5">準拠</text:span></text:p>
              </text:list-item>
              <text:list-item>
                <text:p text:style-name="P8"><text:span text:style-name="T5">軽量・高速</text:span></text:p>
              </text:list-item>
            </text:list>
          </draw:text-box>
        </draw:frame>
        <draw:frame draw:style-name="gr2" draw:text-style-name="P14" draw:layer="layout" svg:width="14cm" svg:height="8.411cm" svg:x="5.5cm" svg:y="9.5cm">
          <draw:image xlink:href="Pictures/10000000000006C300000410ED038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罫線ブロック</text:span></text:p>
              </text:list-item>
              <text:list-item>
                <text:p text:style-name="P8"><text:span text:style-name="T5">CSV</text:span><text:span text:style-name="T5">ブロック</text:span></text:p>
              </text:list-item>
            </text:list>
            <text:p text:style-name="P8"><text:span text:style-name="T5"/></text:p>
            <text:list text:continue-numbering="true" text:style-name="L2">
              <text:list-header>
                <text:p text:style-name="P8"><text:span text:style-name="T5"/></text:p>
              </text:list-header>
            </text:list>
          </draw:text-box>
        </draw:frame>
        <draw:frame draw:style-name="gr2" draw:text-style-name="P14" draw:layer="layout" svg:width="5.132cm" svg:height="7.196cm" svg:x="10.148cm" svg:y="7.5cm">
          <draw:image xlink:href="Pictures/10000000000000C200000110AD383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2T11">
        <draw:frame draw:name="Title 4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（２）</text:span></text:p>
          </draw:text-box>
        </draw:frame>
        <draw:frame draw:name="Content Placeholder 4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エディタで編集し、プレビューで確認</text:span></text:p>
                <text:p text:style-name="P8"><text:span text:style-name="T5">→ プレビューで編集したくなるよね</text:span></text:p>
                <text:p text:style-name="P8"><text:span text:style-name="T5">→ プレビュー内編集機能（限定的）実装</text:span></text:p>
              </text:list-item>
              <text:list-item>
                <text:p text:style-name="P13"><text:span text:style-name="T5">カーソル位置同期を実装すれば</text:span></text:p>
                <text:p text:style-name="P8"><text:span text:style-name="T6">→ </text:span><text:span text:style-name="T5">プレビュー入力をエディタに挿入</text:span></text:p>
              </text:list-item>
              <text:list-item>
                <text:p text:style-name="P13"><text:span text:style-name="T5">多くのエッジケー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今後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vi</text:span><text:span text:style-name="T5">コマンド</text:span></text:p>
              </text:list-item>
              <text:list-item>
                <text:p text:style-name="P8"><text:span text:style-name="T7">CMake</text:span><text:span text:style-name="T7">化</text:span><text:span text:style-name="T5">、</text:span><text:span text:style-name="T5">MacOS</text:span><text:span text:style-name="T5">対応</text:span></text:p>
              </text:list-item>
              <text:list-item>
                <text:p text:style-name="P8"><text:span text:style-name="T7">多言語対応（日英）</text:span></text:p>
              </text:list-item>
              <text:list-item>
                <text:p text:style-name="P8"><text:span text:style-name="T5">正規表現検索 </text:span><text:span text:style-name="T5">/ grep</text:span></text:p>
              </text:list-item>
              <text:list-item>
                <text:p text:style-name="P8"><text:span text:style-name="T5">SVG</text:span></text:p>
              </text:list-item>
              <text:list-item>
                <text:p text:style-name="P8"><text:span text:style-name="T5">パフォーマンス向上</text:span></text:p>
              </text:list-item>
              <text:list-item>
                <text:p text:style-name="P8"><text:span text:style-name="T5">使い勝手改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標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6</text:span><text:span text:style-name="T5">年末 </text:span><text:span text:style-name="T5">ver0.4 </text:span><text:span text:style-name="T5">リリース</text:span></text:p>
              </text:list-item>
              <text:list-item>
                <text:p text:style-name="P8"><text:span text:style-name="T5">累計ダウンロード</text:span><text:span text:style-name="T5">: 2,5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7</meta:editing-cycles>
    <meta:creation-date>2013-01-27T09:14:16</meta:creation-date>
    <dc:date>2026-05-13T05:47:53.338924100</dc:date>
    <meta:editing-duration>PT2H31M44S</meta:editing-duration>
    <meta:generator>LibreOffice/25.8.6.2$Windows_X86_64 LibreOffice_project/b4b39682cd9868fa725bc664aff94278d315bd04</meta:generator>
    <meta:document-statistic meta:object-count="188"/>
    <meta:user-defined meta:name="AppVersion">14.0000</meta:user-defined>
    <meta:user-defined meta:name="PresentationFormat">On-screen Show (4:3)</meta:user-defined>
  </office:meta>
</office:document-meta>
</file>